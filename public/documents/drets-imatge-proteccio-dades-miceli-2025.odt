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7000000B76B3BF6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awasdee" svg:font-family="Sawasdee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Encabezado">
      <style:paragraph-properties>
        <style:tab-stops>
          <style:tab-stop style:position="2.515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Sawasdee" fo:font-size="24pt" fo:language="ca" fo:country="ES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Amiri" fo:font-size="11pt" fo:language="ca" fo:country="ES" style:font-size-asian="11pt" style:font-size-complex="11pt"/>
    </style:style>
    <style:style style:name="P4" style:family="paragraph" style:parent-style-name="Standard">
      <style:paragraph-properties fo:line-height="0.529cm" fo:text-align="justify" style:justify-single-word="false"/>
      <style:text-properties style:font-name="Amiri" fo:font-size="10pt" fo:language="ca" fo:country="ES" style:font-size-asian="10pt" style:font-size-complex="10pt"/>
    </style:style>
    <style:style style:name="P5" style:family="paragraph" style:parent-style-name="Standard">
      <style:paragraph-properties fo:line-height="0.529cm" fo:text-align="justify" style:justify-single-word="false"/>
      <style:text-properties style:font-name="Amiri" fo:font-size="10pt" fo:language="ca" fo:country="ES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0.529cm" fo:text-align="justify" style:justify-single-word="false"/>
      <style:text-properties style:font-name="Amiri" fo:font-size="10pt" fo:language="ca" fo:country="ES" fo:background-color="#fff200" style:font-size-asian="10pt" style:font-size-complex="10pt"/>
    </style:style>
    <style:style style:name="P7" style:family="paragraph" style:parent-style-name="Standard">
      <style:paragraph-properties fo:line-height="0.529cm" fo:text-align="justify" style:justify-single-word="false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>
      <style:paragraph-properties fo:line-height="0.529cm" fo:text-align="justify" style:justify-single-word="false"/>
      <style:text-properties officeooo:paragraph-rsid="001dea59"/>
    </style:style>
    <style:style style:name="P10" style:family="paragraph" style:parent-style-name="Standard">
      <style:paragraph-properties fo:text-align="center" style:justify-single-word="false"/>
      <style:text-properties style:font-name="Sawasdee" fo:font-size="24pt" fo:language="ca" fo:country="ES" fo:font-weight="bold" style:font-size-asian="24pt" style:font-weight-asian="bold" style:font-size-complex="24pt" style:font-weight-complex="bold"/>
    </style:style>
    <style:style style:name="P11" style:family="paragraph">
      <loext:graphic-properties draw:fill="solid" draw:fill-color="#ffffff" draw:opacity="100%"/>
    </style:style>
    <style:style style:name="T1" style:family="text">
      <style:text-properties style:font-name="Sawasdee" fo:font-size="24pt" fo:language="ca" fo:country="ES" fo:font-weight="bold" style:font-size-asian="24pt" style:font-weight-asian="bold" style:font-size-complex="24pt" style:font-weight-complex="bold"/>
    </style:style>
    <style:style style:name="T2" style:family="text">
      <style:text-properties style:font-name="Amiri" fo:font-size="10pt" fo:language="ca" fo:country="ES" style:font-size-asian="10pt" style:font-size-complex="10pt"/>
    </style:style>
    <style:style style:name="T3" style:family="text">
      <style:text-properties style:font-name="Amiri" fo:font-size="10pt" fo:language="ca" fo:country="ES" officeooo:rsid="001dea59" style:font-size-asian="10pt" style:font-size-complex="10pt"/>
    </style:style>
    <style:style style:name="T4" style:family="text">
      <style:text-properties style:font-name="Amiri" fo:font-size="10pt" fo:language="ca" fo:country="ES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9cm" svg:stroke-color="#000000" svg:stroke-opacity="100%" draw:stroke-linejoin="miter" svg:stroke-linecap="butt" draw:fill="solid" draw:fill-color="#ffffff" draw:opacity="100%" fo:min-height="0cm" fo:min-width="0cm" fo:padding-top="-0.012cm" fo:padding-bottom="-0.012cm" fo:padding-left="-0.012cm" fo:padding-right="-0.012cm" loext:decorative="false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09cm" svg:stroke-color="#000000" svg:stroke-opacity="100%" draw:stroke-linejoin="miter" svg:stroke-linecap="butt" draw:fill="solid" draw:fill-color="#ffffff" draw:opacity="100%" fo:min-height="0cm" fo:min-width="0cm" fo:padding-top="-0.012cm" fo:padding-bottom="-0.012cm" fo:padding-left="-0.012cm" fo:padding-right="-0.012cm" loext:decorative="false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solid" svg:stroke-width="0.009cm" svg:stroke-color="#000000" svg:stroke-opacity="100%" draw:stroke-linejoin="miter" svg:stroke-linecap="butt" draw:fill="solid" draw:fill-color="#ffffff" draw:opacity="100%" fo:min-height="0cm" fo:min-width="0cm" fo:padding-top="-0.012cm" fo:padding-bottom="-0.012cm" fo:padding-left="-0.012cm" fo:padding-right="-0.0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7.74cm" svg:y="1.879cm" svg:width="5.56cm" svg:height="1.796cm" draw:z-index="3">
        <draw:image xlink:href="Pictures/1000000000000237000000B76B3BF610.png" xlink:type="simple" xlink:show="embed" xlink:actuate="onLoad" draw:mime-type="image/png"/>
      </draw:frame>
      <text:p text:style-name="P8"><text:span text:style-name="Fuente_20_de_20_párrafo_20_predeter."><text:span text:style-name="T1"><text:tab/> <text:s text:c="3"/><text:tab/></text:span></text:span></text:p>
      <text:p text:style-name="P2"/>
      <text:p text:style-name="P2">PROTECCIÓ DE DADES i DRETS D'IMATGE</text:p>
      <text:p text:style-name="P3"/>
      <text:p text:style-name="P7"><text:span text:style-name="Fuente_20_de_20_párrafo_20_predeter."><text:span text:style-name="T2">La cooperativa </text:span></text:span><text:span text:style-name="Fuente_20_de_20_párrafo_20_predeter."><text:span text:style-name="T3">Miceli Rural Coop</text:span></text:span><text:span text:style-name="Fuente_20_de_20_párrafo_20_predeter."><text:span text:style-name="T2">, SCCL </text:span></text:span><text:span text:style-name="Fuente_20_de_20_párrafo_20_predeter."><text:span text:style-name="T3">(Miceli Social)</text:span></text:span><text:span text:style-name="Fuente_20_de_20_párrafo_20_predeter."><text:span text:style-name="T2">, amb NIF F</text:span></text:span><text:span text:style-name="Fuente_20_de_20_párrafo_20_predeter."><text:span text:style-name="T3">10983864</text:span></text:span><text:span text:style-name="Fuente_20_de_20_párrafo_20_predeter."><text:span text:style-name="T2">, com a responsable del tractament de dades, en compliment de </text:span></text:span><text:span text:style-name="Fuente_20_de_20_párrafo_20_predeter."><text:span text:style-name="T4">la llei orgànica 3/2018, de 5 de desembre, </text:span></text:span><text:span text:style-name="Fuente_20_de_20_párrafo_20_predeter."><text:span text:style-name="T2">de Protecció de Dades Personals i garantia dels Drets Digitals (LOPDGDD)</text:span></text:span><text:span text:style-name="Fuente_20_de_20_párrafo_20_predeter."><text:span text:style-name="T4">,</text:span></text:span><text:span text:style-name="Fuente_20_de_20_párrafo_20_predeter."><text:span text:style-name="T2"> i amb el </text:span></text:span><text:span text:style-name="Fuente_20_de_20_párrafo_20_predeter."><text:span text:style-name="T4">Reglament (UE) 2016/679</text:span></text:span><text:span text:style-name="Fuente_20_de_20_párrafo_20_predeter."><text:span text:style-name="T2"> relatiu al tractament de les dades personals de les persones físiques i a la lliure circulació d’aquestes, exposa que les dades facilitades per a la persona signant d’aquest document, seran guardades en el cens propi de l’entitat, i en podreu exercir el dret d’accés, modificació, cancel·lació i oposició quan ho cregui oportú. <text:s/></text:span></text:span></text:p>
      <text:p text:style-name="P4"/>
      <text:p text:style-name="P7"><text:span text:style-name="Fuente_20_de_20_párrafo_20_predeter."><text:span text:style-name="T2">Tanmateix, la cooperativa disposa de mecanismes de comunicació per donar a conèixer l’entitat i els seus projectes, tant a Internet, com a través de la pàgina web i les xarxes socials, així com a través de materials divulgatius en altres suports (cartells, fotografies, tríptics, etc.). Amb aquestes eines s’informa i es fa difusió de les activitats pròpies de l’agrupament com poden ser els tallers, les formacions, els processos participatius i d’altres activitats locals i internacionals. En alguns dels casos, aquesta difusió es fa a través d’imatges on les persones membres de l’entitat apareixen individualment o en grup realitzant les activitats esmentades, o també, mostrant com les persones participants estan realitzant plenament l’activitat concreta. Donat que el dret a la pròpia imatge està reconegut per la</text:span></text:span><text:span text:style-name="Fuente_20_de_20_párrafo_20_predeter."><text:span text:style-name="T4"> llei orgànica 1/1982</text:span></text:span><text:span text:style-name="Fuente_20_de_20_párrafo_20_predeter."><text:span text:style-name="T2">, l’equip de l’entitat demana el consentiment a les pròpies persones o als pares, mares, en cas de que siguin menors d’edat.</text:span></text:span></text:p>
      <text:p text:style-name="P4"/>
      <text:p text:style-name="P5">AUTORITZACIÓ </text:p>
      <text:p text:style-name="P5"/>
      <text:p text:style-name="P9"><draw:custom-shape text:anchor-type="paragraph" draw:z-index="1" draw:name="Rectángulo 1" draw:style-name="gr2" draw:text-style-name="P11" svg:width="0.304cm" svg:height="0.262cm" svg:x="-0.002cm" svg:y="0.176cm"><text:p/><draw:enhanced-geometry svg:viewBox="0 0 21600 21600" draw:type="non-primitive" draw:enhanced-path="M 0 0 L 21600 0 21600 21600 0 21600 Z N"/></draw:custom-shape><text:span text:style-name="Fuente_20_de_20_párrafo_20_predeter."><text:span text:style-name="T4"><text:s text:c="4"/>CASELLA 1. </text:span></text:span><text:span text:style-name="Fuente_20_de_20_párrafo_20_predeter."><text:span text:style-name="T2">És així com, per mitjà del document en adjunt, m’identifico amb el meu nom i cognom, i atorgo i autoritzo a </text:span></text:span><text:span text:style-name="Fuente_20_de_20_párrafo_20_predeter."><text:span text:style-name="T3">Miceli Rural Coop</text:span></text:span><text:span text:style-name="Fuente_20_de_20_párrafo_20_predeter."><text:span text:style-name="T2">, SCCL, amb NIF número F</text:span></text:span><text:span text:style-name="Fuente_20_de_20_párrafo_20_predeter."><text:span text:style-name="T3">10983864</text:span></text:span><text:span text:style-name="Fuente_20_de_20_párrafo_20_predeter."><text:span text:style-name="T2"> a tractar guardar les meves dades al cens de l’entitat d'acord amb el Reglament (UE) 2016/679 i d’acord amb la llei orgànica 1/1982 per les finalitats esmentades.</text:span></text:span></text:p>
      <text:p text:style-name="P4"/>
      <text:p text:style-name="P9"><draw:custom-shape text:anchor-type="paragraph" draw:z-index="2" draw:name="Rectángulo 1" draw:style-name="gr1" draw:text-style-name="P11" svg:width="0.265cm" svg:height="0.237cm" svg:x="0cm" svg:y="0.153cm"><text:p/><draw:enhanced-geometry svg:viewBox="0 0 21600 21600" draw:type="non-primitive" draw:enhanced-path="M 0 0 L 21600 0 21600 21600 0 21600 Z N"/></draw:custom-shape><text:span text:style-name="Fuente_20_de_20_párrafo_20_predeter."><text:span text:style-name="T4"><text:s text:c="4"/>CASELLA 2. </text:span></text:span><text:span text:style-name="Fuente_20_de_20_párrafo_20_predeter."><text:span text:style-name="T2">Autoritzo a </text:span></text:span><text:span text:style-name="Fuente_20_de_20_párrafo_20_predeter."><text:span text:style-name="T3">Miceli Rural Coop</text:span></text:span><text:span text:style-name="Fuente_20_de_20_párrafo_20_predeter."><text:span text:style-name="T2">, SCCL, amb NIF número F</text:span></text:span><text:span text:style-name="Fuente_20_de_20_párrafo_20_predeter."><text:span text:style-name="T3">10983864</text:span></text:span><text:span text:style-name="Fuente_20_de_20_párrafo_20_predeter."><text:span text:style-name="T2"> a captar, enregistrar, usar, publicar i distribuir imatges de mi a través de qualsevol mitjà de comunicació de la nostra entitat. Per mitjà del present document també renuncio a qualsevol remuneració per drets a la imatge que es pugui derivar de qualsevol utilització.</text:span></text:span></text:p>
      <text:p text:style-name="P6"/>
      <text:p text:style-name="P7"><draw:custom-shape text:anchor-type="paragraph" draw:z-index="0" draw:name="Rectángulo 1" draw:style-name="gr3" draw:text-style-name="P11" svg:width="0.265cm" svg:height="0.237cm" svg:x="-0.046cm" svg:y="0.187cm"><text:p/><draw:enhanced-geometry svg:viewBox="0 0 21600 21600" draw:type="non-primitive" draw:enhanced-path="M 0 0 L 21600 0 21600 21600 0 21600 Z N"/></draw:custom-shape><text:span text:style-name="Fuente_20_de_20_párrafo_20_predeter."><text:span text:style-name="T4"><text:s text:c="3"/>CASELLA 3. </text:span></text:span><text:span text:style-name="Fuente_20_de_20_párrafo_20_predeter."><text:span text:style-name="T2">I marcant la casella corresponent, mostro interès en rebre informació per correu electrònic i/o telèfon sobre altres activitats que realitzi aquesta entitat, essent conscient del dret de modificació i cancel·lació a aquesta subscripció quan es cregui oportú. </text:span></text:span><text:span text:style-name="Fuente_20_de_20_párrafo_20_predeter."><text:span text:style-name="T4">Adreces de contacte: ______________________________________________</text:span></text:span></text:p>
      <text:p text:style-name="P4"/>
      <text:p text:style-name="P5">Destinataris</text:p>
      <text:p text:style-name="P4">Les dades no es comunicaran a tercers, excepte per obligació legal o en cas que siguin necessàries per a la contractació d’assegurances o serveis associats a l’activitat voluntària.</text:p>
      <text:p text:style-name="P4"/>
      <text:p text:style-name="P5">Conservació de les dades</text:p>
      <text:p text:style-name="P4">Les dades es conservaran mentre duri la relació de voluntariat i, posteriorment, durant el temps necessari per complir amb obligacions legals o justificar projectes. Les imatges utilitzades amb finalitats de difusió podran ser conservades mentre es mantingui vigent el material publicat o fins que retireu el vostre consentiment.</text:p>
      <text:p text:style-name="P4"/>
      <text:p text:style-name="P5">Drets de les persones interessades</text:p>
      <text:p text:style-name="P7"><text:soft-page-break/><text:span text:style-name="Fuente_20_de_20_párrafo_20_predeter."><text:span text:style-name="T2">Podeu exercir els vostres drets d’accés, rectificació, supressió, oposició, limitació del tractament i portabilitat de les vostres dades adreçant-vos a </text:span></text:span><text:a xlink:type="simple" xlink:href="mailto:info@miceli.social" text:style-name="Internet_20_link" text:visited-style-name="Visited_20_Internet_20_Link"><text:span text:style-name="Hipervínculo"><text:span text:style-name="T2">info@</text:span></text:span><text:span text:style-name="Hipervínculo"><text:span text:style-name="T3">m</text:span></text:span><text:span text:style-name="T3">iceli.social</text:span></text:a><text:span text:style-name="Fuente_20_de_20_párrafo_20_predeter."><text:span text:style-name="T2">. També teniu dret a retirar el consentiment en qualsevol moment i a presentar una reclamació davant l’Agència Espanyola de Protecció de Dades o l’Autoritat Catalana de Protecció de Dades, si considereu que s’han vulnerat els vostres drets.</text:span></text:span></text:p>
      <text:p text:style-name="P4"/>
      <text:p text:style-name="P5">SIGNATURA</text:p>
      <text:p text:style-name="P5"/>
      <text:p text:style-name="P5">Nom i cognoms: _________________________________________</text:p>
      <text:p text:style-name="P5">DNI/NIE: ____________________</text:p>
      <text:p text:style-name="P5">Signatura: </text:p>
      <text:p text:style-name="P5"/>
      <text:p text:style-name="P5"/>
      <text:p text:style-name="P5"/>
      <text:p text:style-name="P5"/>
      <text:p text:style-name="P5"/>
      <text:p text:style-name="P5">Data: ___ / ___ / ______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awasdee" svg:font-family="Sawasdee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>
        <style:tab-stops>
          <style:tab-stop style:position="2.515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515cm" fo:margin-right="1.6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msi</meta:initial-creator>
    <meta:creation-date>2025-06-19T11:04:00Z</meta:creation-date>
    <dc:date>2026-06-23T12:38:32.218000000</dc:date>
    <meta:editing-cycles>5</meta:editing-cycles>
    <meta:editing-duration>PT46M25S</meta:editing-duration>
    <meta:document-statistic meta:table-count="0" meta:image-count="1" meta:object-count="0" meta:page-count="2" meta:paragraph-count="19" meta:word-count="568" meta:character-count="3772" meta:non-whitespace-character-count="3201"/>
    <meta:template xlink:type="simple" xlink:actuate="onRequest" xlink:title="" xlink:href="../2025-Drets%20d'imatge%20i%20protecció%20de%20dades%20RE.odt/Normal"/>
  </office:meta>
</office:document-meta>
</file>